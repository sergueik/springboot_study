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71D0000013B1FCC7331.png" manifest:media-type="image/png"/>
  <manifest:file-entry manifest:full-path="Pictures/10000001000003830000047581EF83E1.png" manifest:media-type="image/png"/>
  <manifest:file-entry manifest:full-path="Pictures/10000001000005BC00000383EB17FA8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Arial1"/>
    </style:style>
    <style:style style:name="P2" style:family="paragraph" style:parent-style-name="Heading_20_2">
      <style:text-properties style:font-name="Arial1"/>
    </style:style>
    <style:style style:name="P3" style:family="paragraph" style:parent-style-name="Text_20_body">
      <style:text-properties style:font-name="Arial1"/>
    </style:style>
    <style:style style:name="P4" style:family="paragraph" style:parent-style-name="Horizontal_20_Line">
      <style:text-properties style:font-name="Arial1"/>
    </style:style>
    <style:style style:name="P5" style:family="paragraph" style:parent-style-name="Heading_20_3">
      <style:text-properties style:font-name="Arial1"/>
    </style:style>
    <style:style style:name="P6" style:family="paragraph" style:parent-style-name="Text_20_body" style:list-style-name="L1">
      <style:paragraph-properties fo:margin-top="0in" fo:margin-bottom="0in" style:contextual-spacing="false"/>
      <style:text-properties style:font-name="Arial1"/>
    </style:style>
    <style:style style:name="P7" style:family="paragraph" style:parent-style-name="Text_20_body" style:list-style-name="L1">
      <style:text-properties style:font-name="Arial1"/>
    </style:style>
    <style:style style:name="P8" style:family="paragraph" style:parent-style-name="Text_20_body" style:list-style-name="L2">
      <style:paragraph-properties fo:margin-top="0in" fo:margin-bottom="0in" style:contextual-spacing="false"/>
      <style:text-properties style:font-name="Arial1"/>
    </style:style>
    <style:style style:name="P9" style:family="paragraph" style:parent-style-name="Text_20_body" style:list-style-name="L2">
      <style:text-properties style:font-name="Arial1"/>
    </style:style>
    <style:style style:name="P10" style:family="paragraph" style:parent-style-name="Preformatted_20_Text">
      <style:paragraph-properties fo:margin-left="0in" fo:margin-right="0in" fo:text-indent="0in" style:auto-text-indent="false" style:writing-mode="lr-tb"/>
    </style:style>
    <style:style style:name="P11" style:family="paragraph" style:parent-style-name="Text_20_body" style:list-style-name="L3">
      <style:paragraph-properties fo:margin-top="0in" fo:margin-bottom="0in" style:contextual-spacing="false"/>
      <style:text-properties style:font-name="Arial1"/>
    </style:style>
    <style:style style:name="P12" style:family="paragraph" style:parent-style-name="Text_20_body" style:list-style-name="L3">
      <style:text-properties style:font-name="Arial1"/>
    </style:style>
    <style:style style:name="P13" style:family="paragraph" style:parent-style-name="Text_20_body" style:list-style-name="L4">
      <style:paragraph-properties fo:margin-top="0in" fo:margin-bottom="0in" style:contextual-spacing="false"/>
      <style:text-properties style:font-name="Arial1"/>
    </style:style>
    <style:style style:name="P14" style:family="paragraph" style:parent-style-name="Text_20_body" style:list-style-name="L4">
      <style:text-properties style:font-name="Arial1"/>
    </style:style>
    <style:style style:name="P15" style:family="paragraph" style:parent-style-name="Text_20_body" style:list-style-name="L5">
      <style:paragraph-properties fo:margin-top="0in" fo:margin-bottom="0in" style:contextual-spacing="false"/>
      <style:text-properties style:font-name="Arial1"/>
    </style:style>
    <style:style style:name="P16" style:family="paragraph" style:parent-style-name="Text_20_body" style:list-style-name="L5">
      <style:text-properties style:font-name="Arial1"/>
    </style:style>
    <style:style style:name="P17" style:family="paragraph" style:parent-style-name="Text_20_body" style:list-style-name="L6">
      <style:paragraph-properties fo:margin-top="0in" fo:margin-bottom="0in" style:contextual-spacing="false"/>
      <style:text-properties style:font-name="Arial1"/>
    </style:style>
    <style:style style:name="P18" style:family="paragraph" style:parent-style-name="Text_20_body" style:list-style-name="L6">
      <style:text-properties style:font-name="Arial1"/>
    </style:style>
    <style:style style:name="P19" style:family="paragraph" style:parent-style-name="Preformatted_20_Text">
      <style:paragraph-properties style:writing-mode="lr-tb"/>
    </style:style>
    <style:style style:name="P20" style:family="paragraph" style:parent-style-name="Preformatted_20_Text">
      <style:paragraph-properties fo:margin-top="0in" fo:margin-bottom="0.1965in" style:contextual-spacing="false" style:writing-mode="lr-tb"/>
    </style:style>
    <style:style style:name="P21" style:family="paragraph" style:parent-style-name="Text_20_body" style:list-style-name="L7">
      <style:paragraph-properties fo:margin-top="0in" fo:margin-bottom="0in" style:contextual-spacing="false"/>
      <style:text-properties style:font-name="Arial1"/>
    </style:style>
    <style:style style:name="P22" style:family="paragraph" style:parent-style-name="Text_20_body" style:list-style-name="L7">
      <style:text-properties style:font-name="Arial1"/>
    </style:style>
    <style:style style:name="P23" style:family="paragraph" style:parent-style-name="Text_20_body" style:list-style-name="L8">
      <style:paragraph-properties fo:margin-top="0in" fo:margin-bottom="0in" style:contextual-spacing="false"/>
      <style:text-properties style:font-name="Arial1"/>
    </style:style>
    <style:style style:name="P24" style:family="paragraph" style:parent-style-name="Text_20_body" style:list-style-name="L8">
      <style:text-properties style:font-name="Arial1"/>
    </style:style>
    <style:style style:name="P25" style:family="paragraph" style:parent-style-name="Text_20_body" style:list-style-name="L9">
      <style:paragraph-properties fo:margin-top="0in" fo:margin-bottom="0in" style:contextual-spacing="false"/>
      <style:text-properties style:font-name="Arial1"/>
    </style:style>
    <style:style style:name="P26" style:family="paragraph" style:parent-style-name="Text_20_body" style:list-style-name="L9">
      <style:text-properties style:font-name="Arial1"/>
    </style:style>
    <style:style style:name="P27" style:family="paragraph" style:parent-style-name="Text_20_body" style:list-style-name="L10">
      <style:paragraph-properties fo:margin-top="0in" fo:margin-bottom="0in" style:contextual-spacing="false"/>
      <style:text-properties style:font-name="Arial1"/>
    </style:style>
    <style:style style:name="P28" style:family="paragraph" style:parent-style-name="Text_20_body" style:list-style-name="L10">
      <style:text-properties style:font-name="Arial1"/>
    </style:style>
    <style:style style:name="P29" style:family="paragraph" style:parent-style-name="Standard">
      <style:text-properties style:font-name="Arial1"/>
    </style:style>
    <style:style style:name="T1" style:family="text">
      <style:text-properties style:font-name="Arial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rchitectural Evolution of Large File Upload Infrastructure</text:h>
      <text:h text:style-name="P2" text:outline-level="2">Executive Summary</text:h>
      <text:p text:style-name="P3">Adopting Uppy and the TUS protocol provides benefits beyond resumable uploads.</text:p>
      <text:p text:style-name="P3">The primary architectural advantage is preserving future deployment options while avoiding a proprietary upload protocol. Initial implementations may use a monolithic architecture where the business application directly receives uploaded files. As upload volume and file sizes grow, the upload tier can be separated from the business tier without requiring frontend changes.</text:p>
      <text:p text:style-name="P4"/>
      <text:h text:style-name="P2" text:outline-level="2">Phase 1 - Initial Deployment</text:h>
      <text:p text:style-name="P3">The application directly receives uploaded files.</text:p>
      <text:h text:style-name="P5" text:outline-level="3">Characteristics</text:h>
      <text:list text:style-name="L1">
        <text:list-item>
          <text:p text:style-name="P6">Simple deployment</text:p>
        </text:list-item>
        <text:list-item>
          <text:p text:style-name="P6">Minimal infrastructure</text:p>
        </text:list-item>
        <text:list-item>
          <text:p text:style-name="P6">Suitable for moderate upload volume</text:p>
        </text:list-item>
        <text:list-item>
          <text:p text:style-name="P7">Business application owns upload lifecycle</text:p>
        </text:list-item>
      </text:list>
      <text:h text:style-name="P5" text:outline-level="3">Responsibilities of the Business Application</text:h>
      <text:list text:style-name="L2">
        <text:list-item>
          <text:p text:style-name="P8">Authentication</text:p>
        </text:list-item>
        <text:list-item>
          <text:p text:style-name="P8">Upload reception</text:p>
        </text:list-item>
        <text:list-item>
          <text:p text:style-name="P8">Chunk assembly</text:p>
        </text:list-item>
        <text:list-item>
          <text:p text:style-name="P8">Resumability state</text:p>
        </text:list-item>
        <text:list-item>
          <text:p text:style-name="P8">Temporary storage</text:p>
        </text:list-item>
        <text:list-item>
          <text:p text:style-name="P8">Validation</text:p>
        </text:list-item>
        <text:list-item>
          <text:p text:style-name="P9">Business processing</text:p>
        </text:list-item>
      </text:list>
      <text:h text:style-name="P5" text:outline-level="3">Diagram</text:h>
      <text:p text:style-name="P3"/>
      <text:p text:style-name="P10"><draw:frame draw:style-name="fr1" draw:name="Image1" text:anchor-type="char" svg:width="5.3516in" svg:height="6.7917in" draw:z-index="0"><draw:image xlink:href="Pictures/10000001000003830000047581EF83E1.png" xlink:type="simple" xlink:show="embed" xlink:actuate="onLoad" draw:mime-type="image/png"/></draw:frame><text:soft-page-break/><text:span text:style-name="Source_20_Text"><text:span text:style-name="T1"/></text:span></text:p>
      <text:h text:style-name="P2" text:outline-level="2"/>
      <text:h text:style-name="P2" text:outline-level="2">Phase 2 - Growth</text:h>
      <text:p text:style-name="P3">As file sizes and upload volume increase, the application begins spending substantial resources on upload management rather than business processing.</text:p>
      <text:h text:style-name="P5" text:outline-level="3">Typical Growth Drivers</text:h>
      <text:list text:style-name="L3">
        <text:list-item>
          <text:p text:style-name="P11">100 MB uploads become 1 GB uploads</text:p>
        </text:list-item>
        <text:list-item>
          <text:p text:style-name="P11">1 GB uploads become 10+ GB uploads</text:p>
        </text:list-item>
        <text:list-item>
          <text:p text:style-name="P11"><text:soft-page-break/>Increased user concurrency</text:p>
        </text:list-item>
        <text:list-item>
          <text:p text:style-name="P11">Increased storage requirements</text:p>
        </text:list-item>
        <text:list-item>
          <text:p text:style-name="P12">Longer upload durations</text:p>
        </text:list-item>
      </text:list>
      <text:h text:style-name="P5" text:outline-level="3">Emerging Challenges</text:h>
      <text:list text:style-name="L4">
        <text:list-item>
          <text:p text:style-name="P13">Network I/O saturation</text:p>
        </text:list-item>
        <text:list-item>
          <text:p text:style-name="P13">Memory pressure</text:p>
        </text:list-item>
        <text:list-item>
          <text:p text:style-name="P13">Temporary storage management</text:p>
        </text:list-item>
        <text:list-item>
          <text:p text:style-name="P13">Retry handling</text:p>
        </text:list-item>
        <text:list-item>
          <text:p text:style-name="P13">Upload state persistence</text:p>
        </text:list-item>
        <text:list-item>
          <text:p text:style-name="P14">Horizontal scalability</text:p>
        </text:list-item>
      </text:list>
      <text:p text:style-name="P3">At this stage the upload subsystem becomes an infrastructure concern rather than a business concern.</text:p>
      <text:p text:style-name="P4"/>
      <text:h text:style-name="P2" text:outline-level="2">Phase 3 - Dedicated Upload Tier</text:h>
      <text:p text:style-name="P3">Upload processing is separated from business processing.</text:p>
      <text:h text:style-name="P5" text:outline-level="3">Characteristics</text:h>
      <text:list text:style-name="L5">
        <text:list-item>
          <text:p text:style-name="P15">Dedicated upload infrastructure</text:p>
        </text:list-item>
        <text:list-item>
          <text:p text:style-name="P15">Independent scaling</text:p>
        </text:list-item>
        <text:list-item>
          <text:p text:style-name="P15">Reduced load on business services</text:p>
        </text:list-item>
        <text:list-item>
          <text:p text:style-name="P16">Improved operational flexibility</text:p>
        </text:list-item>
      </text:list>
      <text:h text:style-name="P5" text:outline-level="3">Diagram</text:h>
      <text:p text:style-name="P10"><draw:frame draw:style-name="fr2" draw:name="Image2" text:anchor-type="char" svg:width="6.9252in" svg:height="1.1972in" draw:z-index="1"><draw:image xlink:href="Pictures/100000010000071D0000013B1FCC7331.png" xlink:type="simple" xlink:show="embed" xlink:actuate="onLoad" draw:mime-type="image/png"/></draw:frame><text:span text:style-name="Source_20_Text"><text:span text:style-name="T1"/></text:span></text:p>
      <text:h text:style-name="P5" text:outline-level="3">Workflow</text:h>
      <text:list text:style-name="L6">
        <text:list-item>
          <text:p text:style-name="P17">Browser uploads file to TUS endpoint.</text:p>
        </text:list-item>
        <text:list-item>
          <text:p text:style-name="P17">Upload tier stores data.</text:p>
        </text:list-item>
        <text:list-item>
          <text:p text:style-name="P17">Upload completion event is generated.</text:p>
        </text:list-item>
        <text:list-item>
          <text:p text:style-name="P17">Business application receives metadata.</text:p>
        </text:list-item>
        <text:list-item>
          <text:p text:style-name="P18">Business processing begins.</text:p>
        </text:list-item>
      </text:list>
      <text:p text:style-name="P3">Example completion notification:</text:p>
      <text:p text:style-name="P10"><text:soft-page-break/><text:span text:style-name="Source_20_Text"><text:span text:style-name="T1">{</text:span></text:span></text:p>
      <text:p text:style-name="P19"><text:span text:style-name="Source_20_Text"><text:span text:style-name="T1"><text:s text:c="2"/>"uploadId": "12345",</text:span></text:span></text:p>
      <text:p text:style-name="P19"><text:span text:style-name="Source_20_Text"><text:span text:style-name="T1"><text:s text:c="2"/>"fileName": "archive.zip",</text:span></text:span></text:p>
      <text:p text:style-name="P19"><text:span text:style-name="Source_20_Text"><text:span text:style-name="T1"><text:s text:c="2"/>"size": 1234567890,</text:span></text:span></text:p>
      <text:p text:style-name="P19"><text:span text:style-name="Source_20_Text"><text:span text:style-name="T1"><text:s text:c="2"/>"location": "/uploads/12345"</text:span></text:span></text:p>
      <text:p text:style-name="P20"><text:span text:style-name="Source_20_Text"><text:span text:style-name="T1">}</text:span></text:span></text:p>
      <text:p text:style-name="P4"/>
      <text:h text:style-name="P2" text:outline-level="2">Phase 4 - Infrastructure Optimization</text:h>
      <text:p text:style-name="P3">The upload tier may be replaced without changing browser behavior.</text:p>
      <text:p text:style-name="P3">Possible implementations include:</text:p>
      <text:list text:style-name="L7">
        <text:list-item>
          <text:p text:style-name="P21">Embedded Java TUS server</text:p>
        </text:list-item>
        <text:list-item>
          <text:p text:style-name="P21">Dedicated Java TUS cluster</text:p>
        </text:list-item>
        <text:list-item>
          <text:p text:style-name="P21">tusd (Go reference implementation)</text:p>
        </text:list-item>
        <text:list-item>
          <text:p text:style-name="P21">ASP.NET TUS server</text:p>
        </text:list-item>
        <text:list-item>
          <text:p text:style-name="P21">Cloud storage upload gateway</text:p>
        </text:list-item>
        <text:list-item>
          <text:p text:style-name="P22">Managed upload service</text:p>
        </text:list-item>
      </text:list>
      <text:h text:style-name="P5" text:outline-level="3">Diagram</text:h>
      <text:p text:style-name="P10"><draw:frame draw:style-name="fr2" draw:name="Image3" text:anchor-type="char" svg:width="6.9252in" svg:height="4.2402in" draw:z-index="2"><draw:image xlink:href="Pictures/10000001000005BC00000383EB17FA84.png" xlink:type="simple" xlink:show="embed" xlink:actuate="onLoad" draw:mime-type="image/png"/></draw:frame><text:span text:style-name="Source_20_Text"><text:span text:style-name="T1"/></text:span></text:p>
      <text:p text:style-name="P4"/>
      <text:h text:style-name="P2" text:outline-level="2"><text:soft-page-break/>Strategic Benefit of TUS</text:h>
      <text:p text:style-name="P3">The primary value of TUS is not resumable uploads alone.</text:p>
      <text:p text:style-name="P3">The primary value is establishing a stable protocol boundary between:</text:p>
      <text:list text:style-name="L8">
        <text:list-item>
          <text:p text:style-name="P23">Upload infrastructure</text:p>
        </text:list-item>
        <text:list-item>
          <text:p text:style-name="P24">Business applications</text:p>
        </text:list-item>
      </text:list>
      <text:h text:style-name="P5" text:outline-level="3">TUS-Based Architecture</text:h>
      <text:p text:style-name="P10"><text:span text:style-name="Source_20_Text"><text:span text:style-name="T1">Browser</text:span></text:span></text:p>
      <text:p text:style-name="P19"><text:span text:style-name="Source_20_Text"><text:span text:style-name="T1"><text:s text:c="4"/>|</text:span></text:span></text:p>
      <text:p text:style-name="P19"><text:span text:style-name="Source_20_Text"><text:span text:style-name="T1"><text:s text:c="4"/>| TUS Protocol</text:span></text:span></text:p>
      <text:p text:style-name="P19"><text:span text:style-name="Source_20_Text"><text:span text:style-name="T1"><text:s text:c="4"/>v</text:span></text:span></text:p>
      <text:p text:style-name="P19"><text:span text:style-name="Source_20_Text"><text:span text:style-name="T1">Upload Service</text:span></text:span></text:p>
      <text:p text:style-name="P19"><text:span text:style-name="Source_20_Text"><text:span text:style-name="T1"><text:s text:c="4"/>|</text:span></text:span></text:p>
      <text:p text:style-name="P19"><text:span text:style-name="Source_20_Text"><text:span text:style-name="T1"><text:s text:c="4"/>v</text:span></text:span></text:p>
      <text:p text:style-name="P20"><text:span text:style-name="Source_20_Text"><text:span text:style-name="T1">Storage</text:span></text:span></text:p>
      <text:p text:style-name="P3">Any TUS-compliant server can potentially replace another implementation with minimal impact on the frontend.</text:p>
      <text:h text:style-name="P5" text:outline-level="3">Custom Upload Protocol</text:h>
      <text:p text:style-name="P10"><text:span text:style-name="Source_20_Text"><text:span text:style-name="T1">Browser</text:span></text:span></text:p>
      <text:p text:style-name="P19"><text:span text:style-name="Source_20_Text"><text:span text:style-name="T1"><text:s text:c="4"/>|</text:span></text:span></text:p>
      <text:p text:style-name="P19"><text:span text:style-name="Source_20_Text"><text:span text:style-name="T1"><text:s text:c="4"/>| Proprietary Protocol</text:span></text:span></text:p>
      <text:p text:style-name="P19"><text:span text:style-name="Source_20_Text"><text:span text:style-name="T1"><text:s text:c="4"/>v</text:span></text:span></text:p>
      <text:p text:style-name="P20"><text:span text:style-name="Source_20_Text"><text:span text:style-name="T1">Custom Java Endpoint</text:span></text:span></text:p>
      <text:p text:style-name="P3">The frontend and backend become tightly coupled.</text:p>
      <text:p text:style-name="P3">Future migration to:</text:p>
      <text:list text:style-name="L9">
        <text:list-item>
          <text:p text:style-name="P25">tusd</text:p>
        </text:list-item>
        <text:list-item>
          <text:p text:style-name="P25">cloud-native upload services</text:p>
        </text:list-item>
        <text:list-item>
          <text:p text:style-name="P25">dedicated upload appliances</text:p>
        </text:list-item>
        <text:list-item>
          <text:p text:style-name="P26">alternate technology stacks</text:p>
        </text:list-item>
      </text:list>
      <text:p text:style-name="P3">typically requires protocol redesign and frontend changes.</text:p>
      <text:p text:style-name="P4"/>
      <text:h text:style-name="P2" text:outline-level="2">Long-Term Architectural Conclusion</text:h>
      <text:p text:style-name="P3">Adopting Uppy and TUS today preserves future architectural options.</text:p>
      <text:p text:style-name="P3">A project may evolve through:</text:p>
      <text:list text:style-name="L10">
        <text:list-item>
          <text:p text:style-name="P27">Monolithic Java upload handling</text:p>
        </text:list-item>
        <text:list-item>
          <text:p text:style-name="P27">Dedicated upload subsystem</text:p>
        </text:list-item>
        <text:list-item>
          <text:p text:style-name="P27">Horizontally scaled upload infrastructure</text:p>
        </text:list-item>
        <text:list-item>
          <text:p text:style-name="P27"><text:soft-page-break/>Specialized upload middleware</text:p>
        </text:list-item>
        <text:list-item>
          <text:p text:style-name="P28">Cloud-native storage gateways</text:p>
        </text:list-item>
      </text:list>
      <text:p text:style-name="P3">while maintaining a consistent browser-side integration.</text:p>
      <text:p text:style-name="P3">This reduces long-term technical debt and avoids ownership of a proprietary upload protocol.</text:p>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2T10:27:59.791717000</meta:creation-date>
    <dc:date>2026-06-12T10:43:28.226689500</dc:date>
    <meta:editing-duration>PT4M19S</meta:editing-duration>
    <meta:editing-cycles>3</meta:editing-cycles>
    <meta:generator>LibreOffice/26.2.3.2$Windows_X86_64 LibreOffice_project/70e089b17412e4cb7773e41413306b17a2328c34</meta:generator>
    <meta:document-statistic meta:table-count="0" meta:image-count="3" meta:object-count="0" meta:page-count="6" meta:paragraph-count="105" meta:word-count="497" meta:character-count="3475" meta:non-whitespace-character-count="3091"/>
  </office:meta>
</office:document-meta>
</file>